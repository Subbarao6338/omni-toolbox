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IBM Plex Mono" svg:font-family="'IBM Plex Mono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Proxima Nova" svg:font-family="'Proxima Nova'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Drawing_20_Style">
      <style:paragraph-properties fo:margin-left="0in" fo:margin-right="0in" style:line-height-at-least="0.139in" fo:text-indent="0in" style:auto-text-indent="false"/>
      <style:text-properties officeooo:paragraph-rsid="0018dd9c"/>
    </style:style>
    <style:style style:name="P2" style:family="paragraph" style:parent-style-name="Default_20_Drawing_20_Style" style:list-style-name="L2">
      <style:paragraph-properties style:line-height-at-least="0.139in"/>
      <style:text-properties officeooo:paragraph-rsid="0018dd9c"/>
    </style:style>
    <style:style style:name="P3" style:family="paragraph" style:parent-style-name="Default_20_Drawing_20_Style">
      <style:paragraph-properties style:line-height-at-least="0.139in"/>
      <style:text-properties officeooo:paragraph-rsid="001a5fe7"/>
    </style:style>
    <style:style style:name="P4" style:family="paragraph" style:parent-style-name="Default_20_Drawing_20_Style" style:list-style-name="L4">
      <style:paragraph-properties style:line-height-at-least="0.139in"/>
      <style:text-properties officeooo:paragraph-rsid="001dcfc3"/>
    </style:style>
    <style:style style:name="P5" style:family="paragraph" style:parent-style-name="Default_20_Drawing_20_Style">
      <style:paragraph-properties style:line-height-at-least="0.139in"/>
      <style:text-properties officeooo:paragraph-rsid="001dcfc3"/>
    </style:style>
    <style:style style:name="P6" style:family="paragraph" style:parent-style-name="Default_20_Drawing_20_Style">
      <style:paragraph-properties style:line-height-at-least="0.139in"/>
      <style:text-properties officeooo:paragraph-rsid="001f4c32"/>
    </style:style>
    <style:style style:name="P7" style:family="paragraph" style:parent-style-name="Default_20_Drawing_20_Style" style:list-style-name="L5">
      <style:paragraph-properties style:line-height-at-least="0.139in"/>
      <style:text-properties officeooo:paragraph-rsid="0020af39"/>
    </style:style>
    <style:style style:name="P8" style:family="paragraph" style:parent-style-name="Default_20_Drawing_20_Style">
      <style:paragraph-properties fo:margin-left="0in" fo:margin-right="0in" fo:margin-top="0in" fo:margin-bottom="0in" style:contextual-spacing="false" fo:line-height="100%" fo:text-indent="0in" style:auto-text-indent="false"/>
      <style:text-properties style:font-name="Calibri" fo:font-size="12pt" style:font-size-asian="12pt" style:font-size-complex="12pt"/>
    </style:style>
    <style:style style:name="P9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Calibri" fo:font-size="12pt" style:font-size-asian="12pt" style:font-size-complex="12pt"/>
    </style:style>
    <style:style style:name="P10" style:family="paragraph" style:parent-style-name="Default_20_Drawing_20_Style" style:list-style-name="L1">
      <style:paragraph-properties style:line-height-at-least="0.139in"/>
      <style:text-properties style:font-name="Calibri" fo:font-size="12pt" style:font-size-asian="12pt" style:font-size-complex="12pt"/>
    </style:style>
    <style:style style:name="P11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Calibri" fo:font-size="12pt" officeooo:paragraph-rsid="0018dd9c" style:font-size-asian="12pt" style:font-size-complex="12pt"/>
    </style:style>
    <style:style style:name="P12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Calibri" fo:font-size="12pt" style:text-underline-style="solid" style:text-underline-width="auto" style:text-underline-color="font-color" fo:font-weight="bold" officeooo:rsid="0020af39" officeooo:paragraph-rsid="0020af39" style:font-size-asian="12pt" style:font-weight-asian="bold" style:font-size-complex="12pt" style:font-weight-complex="bold"/>
    </style:style>
    <style:style style:name="P13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Calibri" fo:font-size="12pt" style:text-underline-style="none" fo:font-weight="bold" officeooo:paragraph-rsid="0018dd9c" style:font-size-asian="12pt" style:font-weight-asian="bold" style:font-size-complex="12pt" style:font-weight-complex="bold"/>
    </style:style>
    <style:style style:name="P15" style:family="paragraph" style:parent-style-name="Default_20_Drawing_20_Style" style:list-style-name="L3">
      <style:paragraph-properties style:line-height-at-least="0.139in"/>
      <style:text-properties style:font-name="Calibri" fo:font-size="12pt" style:text-underline-style="none" fo:font-weight="normal" officeooo:rsid="001c8507" officeooo:paragraph-rsid="001c8507" style:font-size-asian="12pt" style:font-weight-asian="normal" style:font-size-complex="12pt" style:font-weight-complex="normal"/>
    </style:style>
    <style:style style:name="P16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Calibri" fo:font-size="12pt" style:text-underline-style="none" fo:font-weight="normal" officeooo:rsid="0020af39" officeooo:paragraph-rsid="0020af39" style:font-size-asian="12pt" style:font-weight-asian="normal" style:font-size-complex="12pt" style:font-weight-complex="normal"/>
    </style:style>
    <style:style style:name="P17" style:family="paragraph" style:parent-style-name="Default_20_Drawing_20_Style">
      <style:paragraph-properties fo:margin-left="0in" fo:margin-right="0in" fo:margin-top="0in" fo:margin-bottom="0in" style:contextual-spacing="false" fo:line-height="100%" fo:text-indent="0in" style:auto-text-indent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8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Liberation Sans2" style:font-size-complex="12pt" style:text-emphasize="none"/>
    </style:style>
    <style:style style:name="P19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officeooo:rsid="0020af39" officeooo:paragraph-rsid="0020af39" style:letter-kerning="true" style:font-name-asian="Tahoma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0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officeooo:rsid="0020af39" style:letter-kerning="true" style:font-name-asian="Tahoma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1" style:family="paragraph" style:parent-style-name="Default_20_Drawing_20_Style">
      <style:paragraph-properties style:line-height-at-least="0.139in"/>
      <style:text-properties officeooo:rsid="001a5fe7" officeooo:paragraph-rsid="001a5fe7"/>
    </style:style>
    <style:style style:name="P22" style:family="paragraph" style:parent-style-name="Default_20_Drawing_20_Style">
      <style:paragraph-properties style:line-height-at-least="0.139in"/>
      <style:text-properties fo:font-weight="bold" officeooo:rsid="001a5fe7" officeooo:paragraph-rsid="001a5fe7" style:font-weight-asian="bold" style:font-weight-complex="bold"/>
    </style:style>
    <style:style style:name="P23" style:family="paragraph" style:parent-style-name="Default_20_Drawing_20_Style">
      <style:paragraph-properties style:line-height-at-least="0.139in"/>
      <style:text-properties fo:font-weight="normal" officeooo:rsid="001a5fe7" officeooo:paragraph-rsid="001a5fe7" style:font-weight-asian="normal" style:font-weight-complex="normal"/>
    </style:style>
    <style:style style:name="P24" style:family="paragraph" style:parent-style-name="Default_20_Drawing_20_Style">
      <style:paragraph-properties style:line-height-at-least="0.139in"/>
      <style:text-properties style:text-underline-style="solid" style:text-underline-width="auto" style:text-underline-color="font-color" fo:font-weight="bold" officeooo:rsid="001c8507" officeooo:paragraph-rsid="001c8507" style:font-weight-asian="bold" style:font-weight-complex="bold"/>
    </style:style>
    <style:style style:name="P25" style:family="paragraph" style:parent-style-name="Default_20_Drawing_20_Style">
      <style:paragraph-properties style:line-height-at-least="0.139in"/>
      <style:text-properties style:text-underline-style="none" fo:font-weight="normal" officeooo:rsid="001dcfc3" officeooo:paragraph-rsid="001dcfc3" style:font-weight-asian="normal" style:font-weight-complex="normal"/>
    </style:style>
    <style:style style:name="P26" style:family="paragraph" style:parent-style-name="Standard">
      <style:text-properties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officeooo:rsid="0020af39" style:letter-kerning="true" style:font-name-asian="Tahoma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dd9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letter-spacing="normal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Liberation Sans2" style:font-size-complex="12pt" style:text-emphasize="non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letter-spacing="normal" fo:font-style="normal" fo:text-shadow="none" style:text-underline-style="none" fo:font-weight="normal" officeooo:rsid="001a5fe7" style:letter-kerning="true" style:font-name-asian="Tahoma" style:font-size-asian="12pt" style:font-style-asian="normal" style:font-weight-asian="normal" style:font-name-complex="Liberation Sans2" style:font-size-complex="12pt" style:text-emphasize="non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letter-spacing="normal" fo:font-style="normal" fo:text-shadow="none" style:text-underline-style="none" fo:font-weight="normal" officeooo:rsid="001a5fe7" style:letter-kerning="true" style:font-name-asian="Tahoma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letter-spacing="normal" fo:font-style="normal" fo:text-shadow="none" style:text-underline-style="none" fo:font-weight="normal" officeooo:rsid="001dcfc3" style:letter-kerning="true" style:font-name-asian="Tahoma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letter-spacing="normal" fo:font-style="normal" fo:text-shadow="none" style:text-underline-style="none" fo:font-weight="normal" officeooo:rsid="001f4c32" style:letter-kerning="true" style:font-name-asian="Tahoma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letter-spacing="normal" fo:font-style="normal" fo:text-shadow="none" style:text-underline-style="none" style:letter-kerning="true" style:font-name-asian="Tahoma" style:font-size-asian="12pt" style:font-style-asian="normal" style:font-name-complex="Liberation Sans2" style:font-size-complex="12pt" style:text-emphasize="non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letter-spacing="normal" fo:font-style="normal" fo:text-shadow="none" style:letter-kerning="true" style:font-name-asian="Tahoma" style:font-size-asian="12pt" style:font-style-asian="normal" style:font-name-complex="Liberation Sans2" style:font-size-complex="12pt" style:text-emphasize="none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letter-spacing="normal" fo:font-style="normal" fo:text-shadow="none" officeooo:rsid="0020af39" style:letter-kerning="true" style:font-name-asian="Tahoma" style:font-size-asian="12pt" style:font-style-asian="normal" style:font-name-complex="Liberation Sans2" style:font-size-complex="12pt" style:text-emphasize="none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style:font-name="Calibri" fo:font-size="12pt" officeooo:rsid="0018dd9c" style:font-size-asian="12pt" style:font-size-complex="12pt"/>
    </style:style>
    <style:style style:name="T13" style:family="text">
      <style:text-properties style:font-name="Calibri" fo:font-size="12pt" officeooo:rsid="001a5fe7" style:font-size-asian="12pt" style:font-size-complex="12pt"/>
    </style:style>
    <style:style style:name="T14" style:family="text">
      <style:text-properties style:font-name="Calibri" fo:font-size="12pt" officeooo:rsid="001dcfc3" style:font-size-asian="12pt" style:font-size-complex="12pt"/>
    </style:style>
    <style:style style:name="T15" style:family="text">
      <style:text-properties style:font-name="Calibri" fo:font-size="12pt" style:text-underline-style="none" fo:font-weight="normal" officeooo:rsid="0020af39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officeooo:rsid="0018dd9c" style:letter-kerning="true" style:font-name-asian="Tahoma" style:font-size-asian="12pt" style:font-style-asian="normal" style:font-weight-asian="normal" style:font-name-complex="Liberation Sans2" style:font-size-complex="12pt" style:text-emphasize="none"/>
    </style:style>
    <style:style style:name="T17" style:family="text">
      <style:text-properties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officeooo:rsid="0020af39" style:letter-kerning="true" style:font-name-asian="Tahoma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T18" style:family="text">
      <style:text-properties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officeooo:rsid="0021bd8b" style:letter-kerning="true" style:font-name-asian="Tahoma" style:font-size-asian="12pt" style:font-style-asian="normal" style:font-weight-asian="normal" style:font-name-complex="Liberation Sans2" style:font-size-complex="12pt" style:font-weight-complex="normal" style:text-emphasiz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Prometheus, Telegraf, InfluxDB and Grafana integration</text:span></text:p>
      <text:p text:style-name="P8">Fuctionality of each component</text:p>
      <text:list xml:id="list257544776" text:style-name="L1">
        <text:list-item>
          <text:p text:style-name="P10">Prometheus, telegraf – metrics collector</text:p>
        </text:list-item>
        <text:list-item>
          <text:p text:style-name="P10">InfluxDB – metrics storage(database)</text:p>
        </text:list-item>
        <text:list-item>
          <text:p text:style-name="P10">Grafana – visualization layer</text:p>
        </text:list-item>
      </text:list>
      <text:p text:style-name="P9"/>
      <text:p text:style-name="P13">Telegraf→InfluxDB</text:p>
      <text:p text:style-name="P9">Write collected metrics to InfluxDB through available output plugin -”output.influxdb”</text:p>
      <text:p text:style-name="P1"><text:span text:style-name="T12">ref: </text:span><text:a xlink:type="simple" xlink:href="https://docs.influxdata.com/telegraf/v1.22/plugins/" text:style-name="Internet_20_link" text:visited-style-name="Visited_20_Internet_20_Link"><text:span text:style-name="T13">telegraf plugins</text:span></text:a></text:p>
      <text:p text:style-name="P14">Prometheus→InfluxDB </text:p>
      <text:p text:style-name="P11"><text:span text:style-name="T2">T</text:span>here are two ways: </text:p>
      <text:list xml:id="list583868116" text:style-name="L2">
        <text:list-item>
          <text:p text:style-name="P2"><text:span text:style-name="T11">Remote storage integrations: configure ‘remote_write’ as influxDB<text:line-break/></text:span><text:span text:style-name="T12">ref: </text:span><text:a xlink:type="simple" xlink:href="https://prometheus.io/docs/operating/integrations/#remote-endpoints-and-storage" text:style-name="Internet_20_link" text:visited-style-name="Visited_20_Internet_20_Link"><text:span text:style-name="T13">remote-endpoints-and-storage</text:span></text:a></text:p>
        </text:list-item>
        <text:list-item>
          <text:p text:style-name="P2"><text:span text:style-name="T16">Telegraf input plugin-“</text:span><text:span text:style-name="T3">inputs.prometheus”: </text:span><text:span text:style-name="T4">ga</text:span><text:span text:style-name="T5">thers metrics from HTTP servers exposing metrics in Prometheus format </text:span></text:p>
        </text:list-item>
      </text:list>
      <text:p text:style-name="P22"><text:span text:style-name="T8">InfluxDB→Grafana</text:span></text:p>
      <text:p text:style-name="P23"><text:span text:style-name="T8">Grafana support influxDB as datasource for visualization, so any data from influxDB can be pulled and visualized in Grafana</text:span></text:p>
      <text:p text:style-name="P3"><text:span text:style-name="T5">ref: </text:span><text:a xlink:type="simple" xlink:href="https://grafana.com/docs/grafana/latest/datasources/influxdb/" text:style-name="Internet_20_link" text:visited-style-name="Visited_20_Internet_20_Link">InfluxDb datasource in Grafana</text:a></text:p>
      <text:p text:style-name="P21"><text:span text:style-name="T3"/></text:p>
      <text:p text:style-name="P24"><text:span text:style-name="T9">Azure ADF metrics </text:span><text:span text:style-name="T10">monitoring</text:span></text:p>
      <text:p text:style-name="P25"><text:span text:style-name="T9">Azure metrics exporters:</text:span></text:p>
      <text:p text:style-name="P5"><text:span text:style-name="T6">ref: </text:span><text:a xlink:type="simple" xlink:href="https://prometheus.io/docs/instrumenting/exporters/" text:style-name="Internet_20_link" text:visited-style-name="Visited_20_Internet_20_Link">prometheus exporters</text:a></text:p>
      <text:list xml:id="list1111217816" text:style-name="L4">
        <text:list-item>
          <text:p text:style-name="P4"><text:a xlink:type="simple" xlink:href="https://github.com/RobustPerception/azure_metrics_exporter" text:style-name="Internet_20_link" text:visited-style-name="Visited_20_Internet_20_Link"><text:span text:style-name="T6">azure_metrics_exporter</text:span></text:a></text:p>
        </text:list-item>
        <text:list-item>
          <text:p text:style-name="P4"><text:a xlink:type="simple" xlink:href="https://promitor.io/" text:style-name="Internet_20_link" text:visited-style-name="Visited_20_Internet_20_Link"><text:span text:style-name="T14">promitor</text:span></text:a></text:p>
        </text:list-item>
        <text:list-item>
          <text:p text:style-name="P4"><text:a xlink:type="simple" xlink:href="https://github.com/FXinnovation/azure-health-exporter" text:style-name="Internet_20_link" text:visited-style-name="Visited_20_Internet_20_Link"><text:span text:style-name="T14">azure_health_exporter</text:span></text:a></text:p>
        </text:list-item>
      </text:list>
      <text:p text:style-name="P25"><text:span text:style-name="T9">List of ADF metrics exposed by Azure monitor</text:span></text:p>
      <text:p text:style-name="P6"><text:span text:style-name="T7">ref: </text:span><text:a xlink:type="simple" xlink:href="https://docs.microsoft.com/en-us/azure/data-factory/monitor-metrics-alerts" text:style-name="Internet_20_link" text:visited-style-name="Visited_20_Internet_20_Link">adf-metrics-alert</text:a></text:p>
      <text:list xml:id="list1766224055" text:style-name="L3">
        <text:list-item>
          <text:p text:style-name="P15">Canceled activity runs metrics</text:p>
        </text:list-item>
        <text:list-item>
          <text:p text:style-name="P15">Failed activity runs metrics</text:p>
        </text:list-item>
        <text:list-item>
          <text:p text:style-name="P15">Succeeded activity runs metrics</text:p>
        </text:list-item>
        <text:list-item>
          <text:p text:style-name="P15">Canceled pipeline runs metrics</text:p>
        </text:list-item>
        <text:list-item>
          <text:p text:style-name="P15">Failed pipeline runs metrics</text:p>
        </text:list-item>
        <text:list-item>
          <text:p text:style-name="P15">Succeeded pipeline runs metrics</text:p>
        </text:list-item>
        <text:list-item>
          <text:p text:style-name="P15">Canceled trigger runs metrics</text:p>
        </text:list-item>
        <text:list-item>
          <text:p text:style-name="P15">Failed trigger runs metrics</text:p>
        </text:list-item>
        <text:list-item>
          <text:p text:style-name="P15">Succeeded trigger runs metrics</text:p>
        </text:list-item>
        <text:list-item>
          <text:p text:style-name="P15">Canceled SSIS integration runtime start metrics</text:p>
        </text:list-item>
        <text:list-item>
          <text:p text:style-name="P15">Failed SSIS integration runtime start metrics</text:p>
        </text:list-item>
        <text:list-item>
          <text:p text:style-name="P15">Succeeded SSIS integration runtime start metrics</text:p>
        </text:list-item>
        <text:list-item>
          <text:p text:style-name="P15">Stuck SSIS integration runtime stop metrics</text:p>
        </text:list-item>
        <text:list-item>
          <text:p text:style-name="P15">Succeeded SSIS integration runtime stop metrics</text:p>
        </text:list-item>
        <text:list-item>
          <text:p text:style-name="P15">Canceled SSIS package execution metrics</text:p>
        </text:list-item>
        <text:list-item>
          <text:p text:style-name="P15">Failed SSIS package execution metrics</text:p>
        </text:list-item>
        <text:list-item>
          <text:p text:style-name="P15">Succeeded SSIS package execution metrics</text:p>
        </text:list-item>
        <text:list-item>
          <text:p text:style-name="P15">Elapsed time pipeline runs metrics</text:p>
        </text:list-item>
        <text:list-item>
          <text:p text:style-name="P15"><text:soft-page-break/>Available memory for integration runtime</text:p>
        </text:list-item>
        <text:list-item>
          <text:p text:style-name="P15">Available nodes for integration runtime</text:p>
        </text:list-item>
        <text:list-item>
          <text:p text:style-name="P15">CPU utilization for integration runtime</text:p>
        </text:list-item>
        <text:list-item>
          <text:p text:style-name="P15">Queue duration for integration runtime</text:p>
        </text:list-item>
        <text:list-item>
          <text:p text:style-name="P15">Queue length for integration runtime</text:p>
        </text:list-item>
      </text:list>
      <text:p text:style-name="P18"/>
      <text:p text:style-name="P12">Azure cost metrics monitoring</text:p>
      <text:p text:style-name="P16">Could not found anything reliable resource around to this. Not sure, if azure monitor expose cost metrics or not.</text:p>
      <text:p text:style-name="P16">Few references, may be helpful</text:p>
      <text:list xml:id="list191073609" text:style-name="L5">
        <text:list-item>
          <text:p text:style-name="P7"><text:a xlink:type="simple" xlink:href="https://github.com/dodopizza/azure_billing_exporter" text:style-name="Internet_20_link" text:visited-style-name="Visited_20_Internet_20_Link"><text:span text:style-name="T17">azure_billing_exporter</text:span></text:a></text:p>
        </text:list-item>
        <text:list-item>
          <text:p text:style-name="P7"><text:a xlink:type="simple" xlink:href="https://github.com/grafana/azure-monitor-datasource/issues/81" text:style-name="Internet_20_link" text:visited-style-name="Visited_20_Internet_20_Link"><text:span text:style-name="T18">azure-monitor-datasource-github-issues-81</text:span></text:a></text:p>
        </text:list-item>
      </text:list>
      <text:p text:style-name="P19"/>
      <text:p text:style-name="P20"/>
      <text:p text:style-name="P20"/>
      <text:p text:style-name="P20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IBM Plex Mono" svg:font-family="'IBM Plex Mono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Proxima Nova" svg:font-family="'Proxima Nova'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5:42:23.727000000</meta:creation-date>
    <dc:date>2022-04-22T17:32:37.648000000</dc:date>
    <meta:editing-duration>PT11M59S</meta:editing-duration>
    <meta:editing-cycles>1</meta:editing-cycles>
    <meta:document-statistic meta:table-count="0" meta:image-count="0" meta:object-count="0" meta:page-count="2" meta:paragraph-count="51" meta:word-count="283" meta:character-count="2086" meta:non-whitespace-character-count="1881"/>
    <meta:generator>LibreOffice/7.3.0.3$Windows_X86_64 LibreOffice_project/0f246aa12d0eee4a0f7adcefbf7c878fc2238db3</meta:generator>
  </office:meta>
</office:document-meta>
</file>