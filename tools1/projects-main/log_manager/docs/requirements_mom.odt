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201f1e" loext:opacity="100%" fo:letter-spacing="normal" fo:font-style="normal" fo:font-weight="normal" loext:padding="0in" loext:border="none"/>
    </style:style>
    <style:style style:name="P2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201f1e" loext:opacity="100%" fo:letter-spacing="normal" loext:padding="0in" loext:border="none"/>
    </style:style>
    <style:style style:name="P3" style:family="paragraph" style:parent-style-name="Text_20_body" style:list-style-name="L1">
      <style:paragraph-properties fo:orphans="2" fo:widows="2"/>
      <style:text-properties fo:font-variant="normal" fo:text-transform="none" fo:color="#201f1e" loext:opacity="100%" style:font-name="Calibri" fo:font-size="11pt" fo:letter-spacing="normal" fo:font-style="normal" fo:font-weight="normal" loext:padding="0in" loext:border="none"/>
    </style:style>
    <style:style style:name="P4" style:family="paragraph" style:parent-style-name="Text_20_body" style:list-style-name="L1">
      <style:paragraph-properties fo:margin-top="0in" fo:margin-bottom="0in" style:contextual-spacing="false" fo:orphans="2" fo:widows="2"/>
      <style:text-properties fo:font-variant="normal" fo:text-transform="none" fo:color="#201f1e" loext:opacity="100%" style:font-name="Calibri" fo:font-size="11pt" fo:letter-spacing="normal" fo:font-style="normal" fo:font-weight="normal" loext:padding="0in" loext:border="none"/>
    </style:style>
    <style:style style:name="P5" style:family="paragraph" style:parent-style-name="Text_20_body" style:list-style-name="L2">
      <style:paragraph-properties fo:margin-top="0in" fo:margin-bottom="0in" style:contextual-spacing="false" fo:orphans="2" fo:widows="2"/>
      <style:text-properties fo:font-variant="normal" fo:text-transform="none" fo:color="#201f1e" loext:opacity="100%" style:font-name="Calibri" fo:font-size="11pt" fo:letter-spacing="normal" fo:font-style="normal" fo:font-weight="normal" loext:padding="0in" loext:border="none"/>
    </style:style>
    <style:style style:name="P6" style:family="paragraph" style:parent-style-name="Text_20_body" style:list-style-name="L2">
      <style:paragraph-properties fo:orphans="2" fo:widows="2"/>
      <style:text-properties fo:font-variant="normal" fo:text-transform="none" fo:color="#201f1e" loext:opacity="100%" style:font-name="Calibri" fo:font-size="11pt" fo:letter-spacing="normal" fo:font-style="normal" fo:font-weight="normal" loext:padding="0in" loext:border="none"/>
    </style:style>
    <style:style style:name="P7" style:family="paragraph" style:parent-style-name="Text_20_body" style:list-style-name="L1">
      <style:paragraph-properties fo:orphans="2" fo:widows="2"/>
      <style:text-properties fo:font-variant="normal" fo:text-transform="none" fo:color="#201f1e" loext:opacity="100%" style:font-name="Calibri" fo:font-size="11pt" fo:letter-spacing="normal" fo:font-style="normal" fo:font-weight="normal"/>
    </style:style>
    <style:style style:name="P8" style:family="paragraph" style:parent-style-name="Text_20_body" style:list-style-name="L1">
      <style:paragraph-properties fo:orphans="2" fo:widows="2"/>
      <style:text-properties fo:font-variant="normal" fo:text-transform="none" fo:color="#201f1e" loext:opacity="100%" style:font-name="Calibri" fo:font-size="11pt" fo:letter-spacing="normal" fo:font-style="normal" fo:font-weight="bold" loext:padding="0in" loext:border="none"/>
    </style:style>
    <style:style style:name="P9" style:family="paragraph" style:parent-style-name="Text_20_body" style:list-style-name="L1">
      <style:paragraph-properties fo:orphans="2" fo:widows="2"/>
      <style:text-properties fo:font-variant="normal" fo:text-transform="none" fo:color="#201f1e" loext:opacity="100%" fo:letter-spacing="normal" officeooo:paragraph-rsid="00102f66" loext:padding="0in" loext:border="none"/>
    </style:style>
    <style:style style:name="T1" style:family="text">
      <style:text-properties fo:font-style="normal" fo:font-weight="normal"/>
    </style:style>
    <style:style style:name="T2" style:family="text">
      <style:text-properties loext:padding="0in" loext:border="none"/>
    </style:style>
    <style:style style:name="T3" style:family="text">
      <style:text-properties fo:font-weight="bold" loext:padding="0in" loext:border="none"/>
    </style:style>
    <style:style style:name="T4" style:family="text">
      <style:text-properties fo:font-style="italic" loext:padding="0in" loext:border="none"/>
    </style:style>
    <style:style style:name="T5" style:family="text">
      <style:text-properties style:font-name="Calibri" fo:font-size="11pt" fo:font-style="normal" fo:font-weight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 All,</text:p>
      <text:p text:style-name="P2"> </text:p>
      <text:p text:style-name="P1">PFB MOM points of today’s discussion.</text:p>
      <text:list xml:id="list1987412881" text:style-name="L1">
        <text:list-item>
          <text:p text:style-name="P9"><text:span text:style-name="T5">Need to start implementation for Observability application with a separate project creation</text:span></text:p>
          <text:p text:style-name="P9"><text:span text:style-name="T1">(as similar to other Graviton components: Frontend - ReactJS,  Backend - Python/Django, DB – Postgres)</text:span></text:p>
        </text:list-item>
        <text:list-item>
          <text:p text:style-name="P3">Plan to have 4 major sections in the application .</text:p>
        </text:list-item>
        <text:list-item>
          <text:p text:style-name="P7"><text:span text:style-name="T3">Config page:</text:span><text:span text:style-name="T2"> (separate page) for below layer to get user inputs </text:span><text:span text:style-name="T4">(tab based view)</text:span></text:p>
          <text:list>
            <text:list-item>
              <text:p text:style-name="P4">Database : Influx DB connection info</text:p>
            </text:list-item>
            <text:list-item>
              <text:p text:style-name="P4">Visualization: Grafana URL, any Authentication config</text:p>
            </text:list-item>
            <text:list-item>
              <text:p text:style-name="P3">Observability Engine: Prometheus, Telegraf, Both</text:p>
            </text:list-item>
          </text:list>
        </text:list-item>
        <text:list-item>
          <text:p text:style-name="P7"><text:span text:style-name="T3">Data source Onboarding:  (wizard based) </text:span><text:span text:style-name="T4">(similar to DQC)</text:span></text:p>
          <text:list>
            <text:list-item>
              <text:p text:style-name="P4">Type: Cloud/Non-cloud</text:p>
            </text:list-item>
            <text:list-item>
              <text:p text:style-name="P3">E.g.: AWS, Apache Kafka</text:p>
              <text:list>
                <text:list-item>
                  <text:p text:style-name="P3">Get connection details &amp; metrics</text:p>
                </text:list-item>
              </text:list>
            </text:list-item>
          </text:list>
        </text:list-item>
        <text:list-item>
          <text:p text:style-name="P8">Alerts &amp; Triggers Configuration</text:p>
          <text:list>
            <text:list-item>
              <text:p text:style-name="P3">Option to add alerts &amp; triggers.</text:p>
              <text:list>
                <text:list-item>
                  <text:p text:style-name="P3">Model training trigger for AION/Azure ML</text:p>
                </text:list-item>
              </text:list>
            </text:list-item>
          </text:list>
        </text:list-item>
        <text:list-item>
          <text:p text:style-name="P8">Grafana Embed Dashboard in Landing page</text:p>
          <text:list>
            <text:list-item>
              <text:p text:style-name="P3">To show prediction in Grafana</text:p>
            </text:list-item>
          </text:list>
        </text:list-item>
      </text:list>
      <text:p text:style-name="P2">               </text:p>
      <text:p text:style-name="P1">PFB Action items.</text:p>
      <text:list xml:id="list703526546" text:style-name="L2">
        <text:list-item>
          <text:p text:style-name="P5">Need to select and confirm on  3-4 data sources for onboard.</text:p>
        </text:list-item>
        <text:list-item>
          <text:p text:style-name="P5">Need to share configuration details, user inputs &amp; metrics available for the selected data sources</text:p>
        </text:list-item>
        <text:list-item>
          <text:p text:style-name="P5">Need to explore on possibility of metrics filtration in both Prometheus and Telegraf before storing in Database.</text:p>
        </text:list-item>
        <text:list-item>
          <text:p text:style-name="P5">To apply config, need to identify &amp; validate changes on observability engines</text:p>
        </text:list-item>
        <text:list-item>
          <text:p text:style-name="P6">Need to explore embed Grafana in our application &amp; authentication methods.</text:p>
        </text:list-item>
      </text:list>
      <text:p text:style-name="P2"> </text:p>
      <text:p text:style-name="P1">Kindly add/modify for any missing items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7T14:17:45.318000000</meta:creation-date>
    <dc:date>2022-04-27T14:52:27.945000000</dc:date>
    <meta:editing-duration>PT3M34S</meta:editing-duration>
    <meta:editing-cycles>2</meta:editing-cycles>
    <meta:generator>LibreOffice/7.3.0.3$Windows_X86_64 LibreOffice_project/0f246aa12d0eee4a0f7adcefbf7c878fc2238db3</meta:generator>
    <meta:document-statistic meta:table-count="0" meta:image-count="0" meta:object-count="0" meta:page-count="1" meta:paragraph-count="28" meta:word-count="216" meta:character-count="1342" meta:non-whitespace-character-count="1150"/>
  </office:meta>
</office:document-meta>
</file>